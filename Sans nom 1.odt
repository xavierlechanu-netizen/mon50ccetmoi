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right" style:justify-single-word="false"/>
      <style:text-properties officeooo:rsid="0005b672" officeooo:paragraph-rsid="0005b672"/>
    </style:style>
    <style:style style:name="P2" style:family="paragraph" style:parent-style-name="Standard">
      <style:paragraph-properties fo:text-align="left" style:justify-single-word="false"/>
      <style:text-properties officeooo:rsid="0005b672" officeooo:paragraph-rsid="0005b672"/>
    </style:style>
    <style:style style:name="P3" style:family="paragraph" style:parent-style-name="Text_20_body">
      <style:paragraph-properties fo:text-align="left" style:justify-single-word="false"/>
      <style:text-properties officeooo:rsid="0005b672" officeooo:paragraph-rsid="0005b672"/>
    </style:style>
    <style:style style:name="P4" style:family="paragraph" style:parent-style-name="Text_20_body">
      <style:text-properties officeooo:rsid="0005b672"/>
    </style:style>
    <style:style style:name="P5" style:family="paragraph" style:parent-style-name="Text_20_body">
      <style:paragraph-properties style:writing-mode="lr-tb" style:writing-mode-automatic="false"/>
      <style:text-properties officeooo:rsid="0005b6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.LE CHARNU XAVIER</text:p>
      <text:p text:style-name="P1">67 RUE DU 19 MARS 1962</text:p>
      <text:p text:style-name="P1">43110 AUREC-SUR-LOIRE</text:p>
      <text:p text:style-name="P2"/>
      <text:p text:style-name="P2"/>
      <text:p text:style-name="P2">fait à aurec-sur-loire le 18/05/2026</text:p>
      <text:p text:style-name="P2">date de la décision 06/03/2026</text:p>
      <text:p text:style-name="P2">n° d’enregistrement au greffe : 00003026 6282323505</text:p>
      <text:p text:style-name="P2">OFFICIER DU MINISTERE PLUBLIC</text:p>
      <text:p text:style-name="P2">BP 90333</text:p>
      <text:p text:style-name="P2">43011 Le Puy en velay</text:p>
      <text:p text:style-name="P2">référence 043014 09 1 26 001287 3</text:p>
      <text:p text:style-name="P2"/>
      <text:p text:style-name="P2"/>
      <text:p text:style-name="P3">Objet : Contestation de contravention pour erreur matérielle</text:p>
      <text:p text:style-name="P4">Madame, Monsieur l’Officier du Ministère Public,</text:p>
      <text:p text:style-name="P4">Je me permets de contester la contravention n° 043014 09 1 26 001287 3, établie le 11/12/2025, en raison d’une erreur matérielle commise lors du contrôle.</text:p>
      <text:p text:style-name="P4">En effet, le procès-verbal mentionne un véhicule nécessitant un permis de conduire automobile, alors que je circulais au moment des faits avec un scooter de marque SYM Orbite 2, année 2008, immatriculé HF-474-NH.</text:p>
      <text:p text:style-name="P5">Je précise que ce véhicule ne correspond pas aux caractéristiques indiquées dans la contravention, ce qui laisse apparaître une erreur dans l’identification du véhicule par l’agent verbalisateur.</text:p>
      <text:p text:style-name="P4">Je sollicite donc l’annulation de cette contravention et la rectification des informations erronées figurant sur le procès-verbal.</text:p>
      <text:p text:style-name="P4">Vous trouverez ci-joint une copie de la carte grise du véhicule ainsi qu’une copie de l’avis de contravention.</text:p>
      <text:p text:style-name="P4">Dans l’attente de votre retour, je vous prie d’agréer, Madame, Monsieur l’Officier du Ministère Public, l’expression de mes salutations distinguées.</text:p>
      <text:p text:style-name="P4">LE CHANU XAVIER <text:line-break/>67 RUE DU 19 MARS 1962 43110 AUREC-SUR-LOIRE<text:line-break/>0672691062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8T02:05:21.157524200</meta:creation-date>
    <meta:print-date>2026-05-18T02:31:34.719322000</meta:print-date>
    <dc:date>2026-05-18T02:52:00.989027900</dc:date>
    <meta:editing-duration>PT19M52S</meta:editing-duration>
    <meta:editing-cycles>1</meta:editing-cycles>
    <meta:document-statistic meta:table-count="0" meta:image-count="0" meta:object-count="0" meta:page-count="1" meta:paragraph-count="19" meta:word-count="213" meta:character-count="1398" meta:non-whitespace-character-count="1203"/>
    <meta:generator>LibreOffice/26.2.1.2$Windows_X86_64 LibreOffice_project/620$Build-2</meta:generator>
  </office:meta>
</office:document-meta>
</file>