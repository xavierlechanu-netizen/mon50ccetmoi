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=== RAPPORT BLACK BOX mon50ccetmoi === NIVEAU D'EXPERTISE : BASIQUE (49.99€)</text:h>
      <text:p text:style-name="Text_20_body">Date : 15/05/2026 Points enregistrés : 850 Vitesse maximum : 48 km/h Départ GPS : 48.85661, 2.35222 Arrivée GPS : 48.84612, 2.33721</text:p>
      <text:p text:style-name="Text_20_body">Ce rapport est généré par l'application mon50ccetmoi. Pour toute expertise assurance, contactez : <text:a xlink:type="simple" xlink:href="mailto:contact@mon50ccetmoi.fr" text:style-name="Internet_20_link" text:visited-style-name="Visited_20_Internet_20_Link">contact@mon50ccetmoi.fr</text:a> === FIN DU RAPPORT ===</text:p>
      <text:h text:style-name="Heading_20_2" text:outline-level="2"/>
      <text:h text:style-name="Heading_20_2" text:outline-level="2"/>
      <text:h text:style-name="Heading_20_2" text:outline-level="2">=== RAPPORT BLACK BOX mon50ccetmoi === NIVEAU D'EXPERTISE : INTERMÉDIAIRE (89.99€)</text:h>
      <text:p text:style-name="Text_20_body">Date : 15/05/2026 Points enregistrés : 850 Vitesse maximum : 48 km/h Départ GPS : 48.85661, 2.35222 Arrivée GPS : 48.84612, 2.33721</text:p>
      <text:p text:style-name="Text_20_body">--- ECO-TÉLÉMÉTRIE (INTERMÉDIAIRE) --- Distance estimée : 8.52 km Consommation estimée : 0.30 L Usure pneus estimée : 0.11 % État mécanique : Usage urbain standard</text:p>
      <text:p text:style-name="Text_20_body">Ce rapport est généré par l'application mon50ccetmoi. Pour toute expertise assurance, contactez : <text:a xlink:type="simple" xlink:href="mailto:contact@mon50ccetmoi.fr" text:style-name="Internet_20_link" text:visited-style-name="Visited_20_Internet_20_Link">contact@mon50ccetmoi.fr</text:a> === FIN DU RAPPORT ===</text:p>
      <text:h text:style-name="Heading_20_2" text:outline-level="2"/>
      <text:h text:style-name="Heading_20_2" text:outline-level="2"/>
      <text:h text:style-name="Heading_20_2" text:outline-level="2">=== RAPPORT BLACK BOX mon50ccetmoi === NIVEAU D'EXPERTISE : EXPERT ULTRA (149.99€)</text:h>
      <text:p text:style-name="Text_20_body">Date : 15/05/2026 Points enregistrés : 850 Vitesse maximum : 48 km/h Départ GPS : 48.85661, 2.35222 Arrivée GPS : 48.84612, 2.33721</text:p>
      <text:p text:style-name="Text_20_body">--- ANALYSE SENSORIELLE (EXPERT) --- Force G Max (Freinage) : 1.15 G Angle Inclinaison Max : 28.4 deg Alerte Grip : Aucune anomalie détectée Stabilité trajectoire : 98% (Conduite fluide)</text:p>
      <text:p text:style-name="Text_20_body">--- ECO-TÉLÉMÉTRIE (INTERMÉDIAIRE) --- Distance estimée : 8.52 km Consommation estimée : 0.30 L Usure pneus estimée : 0.11 %</text:p>
      <text:p text:style-name="Text_20_body">--- CERTIFICATION &amp; INTÉGRITÉ --- Hash de sécurité : 8f3d...a21e Météo au moment de l'impact : 18°C, Ciel dégagé, Route sèche.</text:p>
      <text:p text:style-name="Text_20_body">Ce rapport est généré par l'application mon50ccetmoi. Pour toute expertise assurance, contactez : <text:a xlink:type="simple" xlink:href="mailto:contact@mon50ccetmoi.fr" text:style-name="Internet_20_link" text:visited-style-name="Visited_20_Internet_20_Link">contact@mon50ccetmoi.fr</text:a> === FIN DU RAPPORT ===</text:p>
      <text:h text:style-name="Heading_20_2" text:outline-level="2"><text:soft-page-break/></text:h>
      <text:h text:style-name="Heading_20_2" text:outline-level="2" text:is-list-header="true"/>
      <text:h text:style-name="Heading_20_2" text:outline-level="2"/>
      <text:h text:style-name="Heading_20_2" text:outline-level="2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5T23:09:44.674057000</meta:creation-date>
    <meta:generator>LibreOffice/26.2.1.2$Windows_X86_64 LibreOffice_project/620$Build-2</meta:generator>
    <meta:print-date>2026-05-15T23:14:11.815881500</meta:print-date>
    <dc:date>2026-05-15T23:17:06.832919300</dc:date>
    <meta:editing-duration>PT7M22S</meta:editing-duration>
    <meta:editing-cycles>1</meta:editing-cycles>
    <meta:document-statistic meta:table-count="0" meta:image-count="0" meta:object-count="0" meta:page-count="2" meta:paragraph-count="13" meta:word-count="254" meta:character-count="1664" meta:non-whitespace-character-count="1423"/>
  </office:meta>
</office:document-meta>
</file>